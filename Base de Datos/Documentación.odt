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200000389684B7DF9.png" manifest:media-type="image/png"/>
  <manifest:file-entry manifest:full-path="Pictures/100000010000055100000798136203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weight="bold" officeooo:rsid="001cbfd3" officeooo:paragraph-rsid="001cbfd3" style:font-weight-asian="bold" style:font-weight-complex="bold"/>
    </style:style>
    <style:style style:name="P2" style:family="paragraph" style:parent-style-name="Standard">
      <style:text-properties style:font-name="Arial" officeooo:rsid="001cbfd3" officeooo:paragraph-rsid="001cbfd3"/>
    </style:style>
    <style:style style:name="P3" style:family="paragraph" style:parent-style-name="Standard">
      <style:text-properties style:font-name="Arial" style:text-underline-style="solid" style:text-underline-width="auto" style:text-underline-color="font-color" fo:font-weight="bold" officeooo:rsid="001cbfd3" officeooo:paragraph-rsid="001cbfd3" style:font-weight-asian="bold" style:font-weight-complex="bold"/>
    </style:style>
    <style:style style:name="P4" style:family="paragraph" style:parent-style-name="Standard">
      <style:text-properties style:font-name="Arial" style:text-underline-style="none" fo:font-weight="normal" officeooo:rsid="001cbfd3" officeooo:paragraph-rsid="001cbfd3" style:font-weight-asian="normal" style:font-weight-complex="normal"/>
    </style:style>
    <style:style style:name="P5" style:family="paragraph" style:parent-style-name="Standard">
      <style:text-properties style:font-name="Arial" style:text-underline-style="none" fo:font-weight="normal" officeooo:rsid="001d8d0e" officeooo:paragraph-rsid="001d8d0e" style:font-weight-asian="normal" style:font-weight-complex="normal"/>
    </style:style>
    <style:style style:name="P6" style:family="paragraph" style:parent-style-name="Standard">
      <style:text-properties style:font-name="Arial" fo:font-style="italic" style:text-underline-style="solid" style:text-underline-width="auto" style:text-underline-color="font-color" fo:font-weight="normal" officeooo:rsid="001d8d0e" officeooo:paragraph-rsid="001d8d0e" style:font-style-asian="italic" style:font-weight-asian="normal" style:font-style-complex="italic" style:font-weight-complex="normal"/>
    </style:style>
    <style:style style:name="P7" style:family="paragraph" style:parent-style-name="Standard">
      <style:text-properties style:font-name="Arial" fo:font-style="normal" style:text-underline-style="none" fo:font-weight="normal" officeooo:rsid="001d8d0e" officeooo:paragraph-rsid="001d8d0e"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Historias del Hardware<text:tab/>//<text:tab/>1ºDAM 2025/26</text:p>
      <text:p text:style-name="P1"/>
      <text:p text:style-name="P2"><text:span text:style-name="T1">BASE DE DATOS</text:span><text:line-break/><text:line-break/></text:p>
      <text:p text:style-name="P2"><text:span text:style-name="T2">Manuel González Encinas</text:span><text:line-break/><text:line-break/></text:p>
      <text:p text:style-name="P1">1 – <text:span text:style-name="T3">Función de la base de datos</text:span></text:p>
      <text:p text:style-name="P3"/>
      <text:p text:style-name="P4">La base de datos permite almacenar información sobre el almacén del instituto. Esto incluye información sobre los materiales, los armarios, y los usuarios que tienen acceso a la aplicación desde la que se gestionan los préstamos y las devoluciones.</text:p>
      <text:p text:style-name="P4"/>
      <text:p text:style-name="P4">Estos préstamos, devoluciones, y movimientos de material en general, también quedan registrados en la base de datos, de tal manera que el administrador cuente con un historial de movimientos en el almacén.</text:p>
      <text:p text:style-name="P4"/>
      <text:p text:style-name="P5">La base de datos también cuenta con un sistema que supervisa el stock disponible de cada tipo de material. Cuando la cantidad de materiales disponibles está por debajo del mínimo, se genera una alerta de stock, la cual también queda registrada en un historial.</text:p>
      <text:p text:style-name="P1"/>
      <text:p text:style-name="P1">2 – <text:span text:style-name="T3">Tablas</text:span></text:p>
      <text:p text:style-name="P3"><draw:frame draw:style-name="fr1" draw:name="Imagen1" text:anchor-type="char" svg:x="1.249cm" svg:y="0.381cm" svg:width="13.771cm" svg:height="14.058cm" draw:z-index="0"><draw:image xlink:href="Pictures/100000010000037200000389684B7DF9.png" xlink:type="simple" xlink:show="embed" xlink:actuate="onLoad" draw:mime-type="image/png"/></draw:frame></text:p>
      <text:p text:style-name="P6"><text:soft-page-break/>-Ubicación</text:p>
      <text:p text:style-name="P7"/>
      <text:p text:style-name="P7">La tabla ubicación incluye los siguientes campos:<text:line-break/></text:p>
      <text:p text:style-name="P7">id_ubicacion = INT PRIMARY KEY</text:p>
      <text:p text:style-name="P7">armario = INT</text:p>
      <text:p text:style-name="P7">balda = INT</text:p>
      <text:p text:style-name="P7">cajon = INT</text:p>
      <text:p text:style-name="P7">descripcion = VARCHAR(50)</text:p>
      <text:p text:style-name="P7"/>
      <text:p text:style-name="P7">El identificador de la ubicación es id_ubicacion, el cual es un número entero único. No son auto incrementados, ya que se reparten siguiendo el siguiente esquema:<text:line-break/><draw:frame draw:style-name="fr1" draw:name="Imagen2" text:anchor-type="char" svg:x="1.476cm" svg:y="1.453cm" svg:width="13.43cm" svg:height="19.248cm" draw:z-index="1"><draw:image xlink:href="Pictures/1000000100000551000007981362035A.png" xlink:type="simple" xlink:show="embed" xlink:actuate="onLoad" draw:mime-type="image/png"/></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line-break/>-Material</text:p>
      <text:p text:style-name="P6"/>
      <text:p text:style-name="P6"/>
      <text:p text:style-name="P6"/>
      <text:p text:style-name="P6">-Usuario</text:p>
      <text:p text:style-name="P6"/>
      <text:p text:style-name="P6"/>
      <text:p text:style-name="P6"/>
      <text:p text:style-name="P6">-Movimiento</text:p>
      <text:p text:style-name="P6"/>
      <text:p text:style-name="P6"/>
      <text:p text:style-name="P6"/>
      <text:p text:style-name="P6">-Alerta_stock</text:p>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3 – <text:span text:style-name="T3">Funciones y procedimientos</text:span></text:p>
      <text:p text:style-name="P3"/>
      <text:p text:style-name="P3"/>
      <text:p text:style-name="P1"/>
      <text:p text:style-name="P1"><text:soft-page-break/>4 – <text:span text:style-name="T3">Triggers</text:span></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1T17:32:16.430708300</meta:creation-date>
    <dc:date>2026-05-11T18:00:34.401543000</dc:date>
    <meta:editing-duration>PT21M41S</meta:editing-duration>
    <meta:editing-cycles>3</meta:editing-cycles>
    <meta:generator>LibreOffice/25.2.7.2$Windows_X86_64 LibreOffice_project/5cbfd1ab6520636bb5f7b99185aa69bd7456825d</meta:generator>
    <meta:document-statistic meta:table-count="0" meta:image-count="2" meta:object-count="0" meta:page-count="4" meta:paragraph-count="22" meta:word-count="198" meta:character-count="1236" meta:non-whitespace-character-count="1049"/>
  </office:meta>
</office:document-meta>
</file>