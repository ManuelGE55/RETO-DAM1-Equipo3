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200000389684B7DF9.png" manifest:media-type="image/png"/>
  <manifest:file-entry manifest:full-path="Pictures/100000010000021000000050F55B6147.png" manifest:media-type="image/png"/>
  <manifest:file-entry manifest:full-path="Pictures/1000000100000551000007981362035A.png" manifest:media-type="image/png"/>
  <manifest:file-entry manifest:full-path="Pictures/100000010000025F00000043E262EE0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weight="bold" officeooo:rsid="001cbfd3" officeooo:paragraph-rsid="001cbfd3" style:font-weight-asian="bold" style:font-weight-complex="bold"/>
    </style:style>
    <style:style style:name="P2" style:family="paragraph" style:parent-style-name="Standard">
      <style:text-properties style:font-name="Arial" officeooo:rsid="001cbfd3" officeooo:paragraph-rsid="001cbfd3"/>
    </style:style>
    <style:style style:name="P3" style:family="paragraph" style:parent-style-name="Standard">
      <style:text-properties style:font-name="Arial" style:text-underline-style="solid" style:text-underline-width="auto" style:text-underline-color="font-color" fo:font-weight="bold" officeooo:rsid="001cbfd3" officeooo:paragraph-rsid="001cbfd3" style:font-weight-asian="bold" style:font-weight-complex="bold"/>
    </style:style>
    <style:style style:name="P4" style:family="paragraph" style:parent-style-name="Standard">
      <style:text-properties style:font-name="Arial" style:text-underline-style="none" fo:font-weight="normal" officeooo:rsid="001cbfd3" officeooo:paragraph-rsid="001cbfd3" style:font-weight-asian="normal" style:font-weight-complex="normal"/>
    </style:style>
    <style:style style:name="P5" style:family="paragraph" style:parent-style-name="Standard">
      <style:text-properties style:font-name="Arial" style:text-underline-style="none" fo:font-weight="normal" officeooo:rsid="001d8d0e" officeooo:paragraph-rsid="001d8d0e" style:font-weight-asian="normal" style:font-weight-complex="normal"/>
    </style:style>
    <style:style style:name="P6" style:family="paragraph" style:parent-style-name="Standard">
      <style:text-properties style:font-name="Arial" fo:font-style="italic" style:text-underline-style="solid" style:text-underline-width="auto" style:text-underline-color="font-color" fo:font-weight="normal" officeooo:rsid="001d8d0e" officeooo:paragraph-rsid="001d8d0e" style:font-style-asian="italic" style:font-weight-asian="normal" style:font-style-complex="italic" style:font-weight-complex="normal"/>
    </style:style>
    <style:style style:name="P7" style:family="paragraph" style:parent-style-name="Standard">
      <style:text-properties style:font-name="Arial" fo:font-style="normal" style:text-underline-style="none" fo:font-weight="normal" officeooo:rsid="001d8d0e" officeooo:paragraph-rsid="001d8d0e" style:font-style-asian="normal" style:font-weight-asian="normal" style:font-style-complex="normal" style:font-weight-complex="normal"/>
    </style:style>
    <style:style style:name="P8" style:family="paragraph" style:parent-style-name="Standard">
      <style:text-properties style:font-name="Arial" fo:font-style="italic" style:text-underline-style="solid" style:text-underline-width="auto" style:text-underline-color="font-color" fo:font-weight="normal" officeooo:rsid="00204b2e" officeooo:paragraph-rsid="001d8d0e" style:font-style-asian="italic" style:font-weight-asian="normal" style:font-style-complex="italic" style:font-weight-complex="normal"/>
    </style:style>
    <style:style style:name="P9" style:family="paragraph" style:parent-style-name="Standard">
      <style:text-properties style:font-name="Arial" fo:font-style="normal" style:text-underline-style="none" fo:font-weight="normal" officeooo:rsid="00204b2e" officeooo:paragraph-rsid="00205703" style:font-style-asian="normal" style:font-weight-asian="normal" style:font-style-complex="normal" style:font-weight-complex="normal"/>
    </style:style>
    <style:style style:name="P10" style:family="paragraph" style:parent-style-name="Standard">
      <style:text-properties style:font-name="Arial" fo:font-style="italic" style:text-underline-style="none" fo:font-weight="normal" officeooo:rsid="00204b2e" officeooo:paragraph-rsid="00204b2e" style:font-style-asian="italic" style:font-weight-asian="normal" style:font-style-complex="italic" style:font-weight-complex="normal"/>
    </style:style>
    <style:style style:name="P11" style:family="paragraph" style:parent-style-name="Standard">
      <style:text-properties style:font-name="Arial" fo:font-style="normal" style:text-underline-style="none" fo:font-weight="normal" officeooo:rsid="00204b2e" officeooo:paragraph-rsid="00204b2e" style:font-style-asian="normal" style:font-weight-asian="normal" style:font-style-complex="normal" style:font-weight-complex="normal"/>
    </style:style>
    <style:style style:name="P12" style:family="paragraph" style:parent-style-name="Standard">
      <style:text-properties style:font-name="Arial" fo:font-style="normal" style:text-underline-style="none" fo:font-weight="normal" officeooo:rsid="00205703" officeooo:paragraph-rsid="00205703" style:font-style-asian="normal" style:font-weight-asian="normal" style:font-style-complex="normal" style:font-weight-complex="normal"/>
    </style:style>
    <style:style style:name="P13" style:family="paragraph" style:parent-style-name="Standard">
      <style:text-properties style:font-name="Arial" fo:font-style="italic" style:text-underline-style="none" fo:font-weight="normal" officeooo:rsid="00205703" officeooo:paragraph-rsid="00205703" style:font-style-asian="italic" style:font-weight-asian="normal" style:font-style-complex="italic" style:font-weight-complex="normal"/>
    </style:style>
    <style:style style:name="P14" style:family="paragraph" style:parent-style-name="Standard">
      <style:text-properties style:font-name="Arial" fo:font-style="normal" style:text-underline-style="none" fo:font-weight="normal" officeooo:rsid="00205da6" officeooo:paragraph-rsid="00205da6" style:font-style-asian="normal" style:font-weight-asian="normal" style:font-style-complex="normal" style:font-weight-complex="normal"/>
    </style:style>
    <style:style style:name="P15" style:family="paragraph" style:parent-style-name="Standard">
      <style:text-properties style:font-name="Arial" fo:font-style="normal" style:text-underline-style="none" fo:font-weight="normal" officeooo:rsid="00205da6" officeooo:paragraph-rsid="0021a096" style:font-style-asian="normal" style:font-weight-asian="normal" style:font-style-complex="normal" style:font-weight-complex="normal"/>
    </style:style>
    <style:style style:name="P16" style:family="paragraph" style:parent-style-name="Standard">
      <style:text-properties style:font-name="Arial" fo:font-style="normal" style:text-underline-style="none" fo:font-weight="normal" officeooo:rsid="0021a096" officeooo:paragraph-rsid="0021a096" style:font-style-asian="normal" style:font-weight-asian="normal" style:font-style-complex="normal" style:font-weight-complex="normal"/>
    </style:style>
    <style:style style:name="P17" style:family="paragraph" style:parent-style-name="Standard">
      <style:text-properties style:font-name="Arial" fo:font-style="normal" style:text-underline-style="none" fo:font-weight="normal" officeooo:rsid="0021e7e7" officeooo:paragraph-rsid="0021e7e7" style:font-style-asian="normal" style:font-weight-asian="normal" style:font-style-complex="normal" style:font-weight-complex="normal"/>
    </style:style>
    <style:style style:name="P18" style:family="paragraph" style:parent-style-name="Standard">
      <style:text-properties style:font-name="Arial" fo:font-style="normal" style:text-underline-style="none" fo:font-weight="normal" officeooo:rsid="002842f4" officeooo:paragraph-rsid="002842f4" style:font-style-asian="normal" style:font-weight-asian="normal" style:font-style-complex="normal" style:font-weight-complex="normal"/>
    </style:style>
    <style:style style:name="P19" style:family="paragraph" style:parent-style-name="Standard">
      <style:text-properties style:font-name="Arial" fo:font-style="normal" style:text-underline-style="none" fo:font-weight="normal" officeooo:rsid="002842f4" officeooo:paragraph-rsid="0029d950" style:font-style-asian="normal" style:font-weight-asian="normal" style:font-style-complex="normal" style:font-weight-complex="normal"/>
    </style:style>
    <style:style style:name="P20" style:family="paragraph" style:parent-style-name="Standard">
      <style:text-properties style:font-name="Arial" fo:font-style="normal" style:text-underline-style="none" fo:font-weight="normal" officeooo:rsid="0029d950" officeooo:paragraph-rsid="0029d950" style:font-style-asian="normal" style:font-weight-asian="normal" style:font-style-complex="normal" style:font-weight-complex="normal"/>
    </style:style>
    <style:style style:name="P21" style:family="paragraph" style:parent-style-name="Standard">
      <style:text-properties style:font-name="Arial" fo:font-style="normal" style:text-underline-style="none" fo:font-weight="normal" officeooo:rsid="002a6e9d" officeooo:paragraph-rsid="002a6e9d" style:font-style-asian="normal" style:font-weight-asian="normal" style:font-style-complex="normal" style:font-weight-complex="normal"/>
    </style:style>
    <style:style style:name="P22" style:family="paragraph" style:parent-style-name="Standard">
      <style:text-properties style:font-name="Arial" fo:font-weight="bold" officeooo:rsid="001cbfd3" officeooo:paragraph-rsid="00238789" style:font-weight-asian="bold" style:font-weight-complex="bold"/>
    </style:style>
    <style:style style:name="P23" style:family="paragraph" style:parent-style-name="Standard">
      <style:text-properties style:font-name="Arial" fo:font-weight="bold" officeooo:rsid="001cbfd3" officeooo:paragraph-rsid="001d8d0e" style:font-weight-asian="bold" style:font-weight-complex="bold"/>
    </style:style>
    <style:style style:name="P24" style:family="paragraph" style:parent-style-name="Standard">
      <style:text-properties style:font-name="Arial" fo:font-weight="bold" officeooo:rsid="001cbfd3" officeooo:paragraph-rsid="002a6e9d" style:font-weight-asian="bold" style:font-weight-complex="bold"/>
    </style:style>
    <style:style style:name="P25" style:family="paragraph" style:parent-style-name="Standard">
      <style:text-properties style:font-name="Arial" fo:font-weight="normal" officeooo:rsid="002a6e9d" officeooo:paragraph-rsid="002a6e9d" style:font-weight-asian="normal" style:font-weight-complex="normal"/>
    </style:style>
    <style:style style:name="P26" style:family="paragraph" style:parent-style-name="Standard">
      <style:text-properties style:font-name="Arial" style:text-underline-style="none" fo:font-weight="normal" officeooo:rsid="002a8ed1" officeooo:paragraph-rsid="002a8ed1" style:font-weight-asian="normal" style:font-weight-complex="normal"/>
    </style:style>
    <style:style style:name="P27" style:family="paragraph" style:parent-style-name="Standard">
      <style:text-properties style:font-name="Arial" style:text-underline-style="none" fo:font-weight="normal" officeooo:rsid="002456de" officeooo:paragraph-rsid="001cbfd3" style:font-weight-asian="normal" style:font-weight-complex="normal"/>
    </style:style>
    <style:style style:name="P28" style:family="paragraph" style:parent-style-name="Standard">
      <style:text-properties style:font-name="Arial" style:text-underline-style="none" fo:font-weight="normal" officeooo:rsid="00253791" officeooo:paragraph-rsid="00253791" style:font-weight-asian="normal" style:font-weight-complex="normal"/>
    </style:style>
    <style:style style:name="P29" style:family="paragraph" style:parent-style-name="Standard">
      <style:text-properties style:font-name="Arial" style:text-underline-style="solid" style:text-underline-width="auto" style:text-underline-color="font-color" fo:font-weight="normal" officeooo:rsid="00253791" officeooo:paragraph-rsid="00253791" style:font-weight-asian="normal" style:font-weight-complex="normal"/>
    </style:style>
    <style:style style:name="P30" style:family="paragraph" style:parent-style-name="Standard">
      <style:text-properties style:font-name="Arial" style:text-underline-style="none" fo:font-weight="normal" officeooo:rsid="002aa732" officeooo:paragraph-rsid="002aa732" style:font-weight-asian="normal" style:font-weight-complex="normal"/>
    </style:style>
    <style:style style:name="P31" style:family="paragraph" style:parent-style-name="Standard">
      <style:text-properties style:font-name="Arial" style:text-underline-style="none" fo:font-weight="normal" officeooo:rsid="002aa732" officeooo:paragraph-rsid="002c2525" style:font-weight-asian="normal" style:font-weight-complex="normal"/>
    </style:style>
    <style:style style:name="P32" style:family="paragraph" style:parent-style-name="Standard">
      <style:text-properties style:font-name="Arial" style:text-underline-style="none" fo:font-weight="normal" officeooo:rsid="002c2525" officeooo:paragraph-rsid="002c2525" style:font-weight-asian="normal" style:font-weight-complex="normal"/>
    </style:style>
    <style:style style:name="P33" style:family="paragraph" style:parent-style-name="Standard">
      <style:text-properties style:font-name="Arial" fo:font-size="11pt" style:text-underline-style="none" fo:font-weight="normal" officeooo:rsid="002d71c9" officeooo:paragraph-rsid="002d71c9" style:font-size-asian="11pt" style:font-weight-asian="normal" style:font-size-complex="11pt" style:font-weight-complex="normal"/>
    </style:style>
    <style:style style:name="P34" style:family="paragraph" style:parent-style-name="Standard">
      <style:text-properties style:font-name="Arial" style:text-underline-style="none" fo:font-weight="normal" officeooo:rsid="002d71c9" officeooo:paragraph-rsid="002d71c9"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style="italic" officeooo:rsid="002842f4" style:font-style-asian="italic" style:font-style-complex="italic"/>
    </style:style>
    <style:style style:name="T5" style:family="text">
      <style:text-properties officeooo:rsid="002842f4"/>
    </style:style>
    <style:style style:name="T6" style:family="text">
      <style:text-properties officeooo:rsid="00205703"/>
    </style:style>
    <style:style style:name="T7" style:family="text">
      <style:text-properties officeooo:rsid="0021a096"/>
    </style:style>
    <style:style style:name="T8" style:family="text">
      <style:text-properties officeooo:rsid="0029d950"/>
    </style:style>
    <style:style style:name="T9" style:family="text">
      <style:text-properties officeooo:rsid="002a6e9d"/>
    </style:style>
    <style:style style:name="T10" style:family="text">
      <style:text-properties style:text-underline-style="solid" style:text-underline-width="auto" style:text-underline-color="font-color" officeooo:rsid="002a6e9d"/>
    </style:style>
    <style:style style:name="T11" style:family="text">
      <style:text-properties officeooo:rsid="002aa732"/>
    </style:style>
    <style:style style:name="T1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O: Historias del Hardware<text:tab/>//<text:tab/>1ºDAM 2025/26</text:p>
      <text:p text:style-name="P1"/>
      <text:p text:style-name="P2"><text:span text:style-name="T1">BASE DE DATOS</text:span><text:line-break/><text:line-break/></text:p>
      <text:p text:style-name="P2"><text:span text:style-name="T2">Manuel González Encinas</text:span><text:line-break/><text:line-break/></text:p>
      <text:p text:style-name="P1">1 – <text:span text:style-name="T3">Función de la base de datos</text:span></text:p>
      <text:p text:style-name="P3"/>
      <text:p text:style-name="P4">La base de datos permite almacenar información sobre el almacén del instituto. Esto incluye información sobre los materiales, los armarios, y los usuarios que tienen acceso a la aplicación desde la que se gestionan los préstamos y las devoluciones.</text:p>
      <text:p text:style-name="P4"/>
      <text:p text:style-name="P4">Estos préstamos, devoluciones, y movimientos de material en general, también quedan registrados en la base de datos, de tal manera que el administrador cuente con un historial de movimientos en el almacén.</text:p>
      <text:p text:style-name="P4"/>
      <text:p text:style-name="P5">La base de datos también cuenta con un sistema que supervisa el stock disponible de cada tipo de material. Cuando la cantidad de materiales disponibles está por debajo del mínimo, se genera una alerta de stock, la cual también queda registrada en un historial.</text:p>
      <text:p text:style-name="P1"/>
      <text:p text:style-name="P1">2 – <text:span text:style-name="T3">Tablas</text:span></text:p>
      <text:p text:style-name="P3"><draw:frame draw:style-name="fr1" draw:name="Imagen1" text:anchor-type="char" svg:x="1.249cm" svg:y="0.381cm" svg:width="13.771cm" svg:height="14.058cm" draw:z-index="0"><draw:image xlink:href="Pictures/100000010000037200000389684B7DF9.png" xlink:type="simple" xlink:show="embed" xlink:actuate="onLoad" draw:mime-type="image/png"/></draw:frame></text:p>
      <text:p text:style-name="P6"><text:soft-page-break/>-Ubicación</text:p>
      <text:p text:style-name="P7"/>
      <text:p text:style-name="P7">La tabla ubicación incluye los siguientes campos:<text:line-break/></text:p>
      <text:p text:style-name="P7">id_ubicacion = INT PRIMARY KEY</text:p>
      <text:p text:style-name="P7">armario = INT</text:p>
      <text:p text:style-name="P7">balda = INT</text:p>
      <text:p text:style-name="P7">cajon = INT</text:p>
      <text:p text:style-name="P7">descripcion = VARCHAR(50)</text:p>
      <text:p text:style-name="P7"/>
      <text:p text:style-name="P7">El identificador de la ubicación es id_ubicacion, el cual es un número entero único. No son auto incrementados, ya que se reparten siguiendo el siguiente esquema:<text:line-break/><draw:frame draw:style-name="fr1" draw:name="Imagen2" text:anchor-type="char" svg:x="1.476cm" svg:y="1.453cm" svg:width="13.43cm" svg:height="19.248cm" draw:z-index="1"><draw:image xlink:href="Pictures/1000000100000551000007981362035A.png" xlink:type="simple" xlink:show="embed" xlink:actuate="onLoad" draw:mime-type="image/png"/></draw:frame></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9"><text:soft-page-break/>Armario, balda y cajon contienen los códigos que indican la estructura en la que está contenida la ubicación.<text:line-break/><text:line-break/>De esta manera, el armario 1 es así:</text:p>
      <text:p text:style-name="P9"><text:line-break/><text:span text:style-name="T2">-Identificador = 11<text:line-break/>-Armario = 1</text:span><text:span text:style-name="T4">1</text:span></text:p>
      <text:p text:style-name="P10">-Balda = NULL</text:p>
      <text:p text:style-name="P10">-Cajon = NULL<text:line-break/>-Descripción = A1</text:p>
      <text:p text:style-name="P11"/>
      <text:p text:style-name="P11">El identificador debería ser A1, pero, como es un INT, se convierte en 11 siguiendo el procedimiento indicado en el esquema.</text:p>
      <text:p text:style-name="P11"/>
      <text:p text:style-name="P11"/>
      <text:p text:style-name="P9">Existen baldas independientes que no están contenidas en ningún armario. Estas se guardan así:</text:p>
      <text:p text:style-name="P9"><text:line-break/><text:span text:style-name="T2">-Identificador = 2001<text:line-break/>-Armario = NULL</text:span></text:p>
      <text:p text:style-name="P10">-Balda = <text:span text:style-name="T5">2001</text:span></text:p>
      <text:p text:style-name="P10">-Cajon = NULL</text:p>
      <text:p text:style-name="P10">-Descripción = Balda B001</text:p>
      <text:p text:style-name="P11"/>
      <text:p text:style-name="P11"/>
      <text:p text:style-name="P11">Una balda contenida en un armario se guarda así:</text:p>
      <text:p text:style-name="P11"/>
      <text:p text:style-name="P10">-Identificador = 2101 </text:p>
      <text:p text:style-name="P10">-Armario = 11</text:p>
      <text:p text:style-name="P10">-Balda = <text:span text:style-name="T5">2</text:span>101</text:p>
      <text:p text:style-name="P10">-Cajon = NULL</text:p>
      <text:p text:style-name="P10">-Descripción = <text:span text:style-name="T6">Balda B101</text:span></text:p>
      <text:p text:style-name="P11"/>
      <text:p text:style-name="P12">En el código de la balda, el tercer dígito empezando desde la derecha hace referencia al armario, de tal manera que, la balda 101 está en el armario 1, la 302 en el armario 3, y la 001 no está en ningún armario.</text:p>
      <text:p text:style-name="P12"/>
      <text:p text:style-name="P12"/>
      <text:p text:style-name="P12">Un cajón se guarda así:</text:p>
      <text:p text:style-name="P12"/>
      <text:p text:style-name="P13">-Identificador = 300301</text:p>
      <text:p text:style-name="P13">-Armario = NULL</text:p>
      <text:p text:style-name="P13">-Balda = <text:span text:style-name="T5">2003</text:span></text:p>
      <text:p text:style-name="P13">-Cajon = <text:span text:style-name="T5">3</text:span>00301</text:p>
      <text:p text:style-name="P13">-Descripción = Cajon C00301</text:p>
      <text:p text:style-name="P13"/>
      <text:p text:style-name="P12">En el código <text:span text:style-name="T2">cajon</text:span>, los tres primeros dígitos empezando desde la izquierda <text:span text:style-name="T5">(y saltando el primer número, que indica si es armario, balda, o cajón)</text:span> son el código de la balda.</text:p>
      <text:p text:style-name="P11"/>
      <text:p text:style-name="P6"/>
      <text:p text:style-name="P6"/>
      <text:p text:style-name="P6"><text:soft-page-break/><text:line-break/>-Material</text:p>
      <text:p text:style-name="P6"/>
      <text:p text:style-name="P14">La tabla material se compone de los siguientes campos: <text:line-break/></text:p>
      <text:p text:style-name="P14">id_material = INT PRIMARY KEY AUTO_INCREMENT</text:p>
      <text:p text:style-name="P14">nombre = VARCHAR(30)</text:p>
      <text:p text:style-name="P14">descripcion = VARCHAR (60)</text:p>
      <text:p text:style-name="P14">cantidad = INT</text:p>
      <text:p text:style-name="P14">stock_minimo = INT</text:p>
      <text:p text:style-name="P14">categoria = ENUM<text:line-break/>estado = ENUM</text:p>
      <text:p text:style-name="P14">id_ubicacion = INT FOREIGN KEY</text:p>
      <text:p text:style-name="P14"/>
      <text:p text:style-name="P14">El id_material es un número entero auto incrementado, que funciona como identificador del material.</text:p>
      <text:p text:style-name="P14"/>
      <text:p text:style-name="P14">El nombre indica la naturaleza del material, mientras que la descripción añade detalles genéricos y/o individuales.</text:p>
      <text:p text:style-name="P15">Es importante tener en cuenta que nombre no es un valor individual, de tal manera que los materiales <text:span text:style-name="T7">están organizados según:</text:span></text:p>
      <text:p text:style-name="P15"/>
      <text:p text:style-name="P16"><text:span text:style-name="T2">Categoría → Nombre → Estado → Descripción</text:span> </text:p>
      <text:p text:style-name="P16"/>
      <text:p text:style-name="P16">Descripción y estado es el único campo que puede dar individualidad al material.</text:p>
      <text:p text:style-name="P16"/>
      <text:p text:style-name="P16">La cantidad es un atributo común a todos los materiales con el mismo nombre. Indica el número de materiales que hay registrados con el mismo nombre.</text:p>
      <text:p text:style-name="P16">Stock mínimo también es un atributo común. Almacena el número mínimo de materiales que puede haber registrados con el mismo nombre. Si la cantidad fuese igual o inferior al stock mínimo, se crearía una alerta de stock.</text:p>
      <text:p text:style-name="P16"/>
      <text:p text:style-name="P16">Categoría es un valor enumerado que indica el tipo general de material. Los valores posibles son “Hardware”, ”Herramienta”, ”Fungible” y “Cuaderno”.</text:p>
      <text:p text:style-name="P16"/>
      <text:p text:style-name="P16">Estado también es un valor enumerado que indica el estado de disponibilidad del material. De esta manera, los valores posibles son “Disponible”, “Prestado”, “En reparación” y “Retirado”.</text:p>
      <text:p text:style-name="P16"/>
      <text:p text:style-name="P17">Y por último, id_ubicacion es una clave foránea que hace referencia a la ubicación donde está almacenado el material.</text:p>
      <text:p text:style-name="P14"/>
      <text:p text:style-name="P6"/>
      <text:p text:style-name="P6">-Usuario</text:p>
      <text:p text:style-name="P6"/>
      <text:p text:style-name="P17">La tabla usuarios tiene los siguientes campos:<text:line-break/></text:p>
      <text:p text:style-name="P17">id_usuario = INT PRIMARY KEY AUTO_INCREMENT</text:p>
      <text:p text:style-name="P17">nombre = VARCHAR(20)</text:p>
      <text:p text:style-name="P17">apellidos = VARCHAR(30)</text:p>
      <text:p text:style-name="P17">email = VARCHAR(30) UNIQUE</text:p>
      <text:p text:style-name="P17">contraseña = VARCHAR(20)</text:p>
      <text:p text:style-name="P17"><text:soft-page-break/>rol = ENUM</text:p>
      <text:p text:style-name="P17">activo = BOOLEAN</text:p>
      <text:p text:style-name="P17">fecha_creacion = DATE</text:p>
      <text:p text:style-name="P17"/>
      <text:p text:style-name="P17">En esta tabla se almacenarán los datos de los usuarios que creen una cuenta en la aplicación de escritorio.</text:p>
      <text:p text:style-name="P17"/>
      <text:p text:style-name="P17">Id_usuario es un número entero auto incrementado que funciona como identificador del usuario.</text:p>
      <text:p text:style-name="P17">Email guarda la dirección de correo electrónico del usuario. Al ser UNIQUE, no se puede guardar una misma dirección de email dos veces.</text:p>
      <text:p text:style-name="P17"/>
      <text:p text:style-name="P17">El rol es un valor enumerado con las siguientes opciones: “Profesor” y “Administrador”.</text:p>
      <text:p text:style-name="P17">Según el rol que un usuario tenga registrado, en la aplicación tendrá, o no, una serie de funciones restringidas.</text:p>
      <text:p text:style-name="P17"/>
      <text:p text:style-name="P17">Activo es un booleano que indica si el usuario se ha dado de alta, o de baja.</text:p>
      <text:p text:style-name="P17"/>
      <text:p text:style-name="P17">Y fecha_creacion guarda la fecha en la que se creó el usuario.</text:p>
      <text:p text:style-name="P6"/>
      <text:p text:style-name="P6">-Movimiento</text:p>
      <text:p text:style-name="P6"/>
      <text:p text:style-name="P18">La tabla movimiento contiene los siguientes campos:<text:line-break/></text:p>
      <text:p text:style-name="P18">id_movimiento = INT AUTO_INCREMENT PRIMARY KEY<text:line-break/>id_usuario = INT FOREIGN KEY<text:line-break/>id_material = INT FOREIGN KEY</text:p>
      <text:p text:style-name="P18">fecha = DATE</text:p>
      <text:p text:style-name="P18">observacion = VARCHAR(60)<text:line-break/></text:p>
      <text:p text:style-name="P19">Esta tabla funciona como un historial de todas las actualizaciones que se den sobre cualquier material. Recibe <text:span text:style-name="T8">nuevas filas a través del trigger “trg_movimiento”.<text:line-break/><text:line-break/>El id_movimiento funciona como identificador para la fila que guarde la actualización.<text:line-break/><text:line-break/>El id_usuario apunta al identificador del usuario que ejecutó la actualización.<text:line-break/><text:line-break/>El id_material apunta al identificador del material actualizado.</text:span></text:p>
      <text:p text:style-name="P18"/>
      <text:p text:style-name="P20">La fecha guarda la fecha en la que se realizó la actualización.</text:p>
      <text:p text:style-name="P20"/>
      <text:p text:style-name="P20">Y por último, la observación contiene un texto donde se indica el dato actualizado.</text:p>
      <text:p text:style-name="P6"/>
      <text:p text:style-name="P6">-Alerta_stock</text:p>
      <text:p text:style-name="P6"/>
      <text:p text:style-name="P20">La tabla alerta_stock contiene los siguientes campos:<text:line-break/><text:line-break/>id_alerta = INT AUTO_INCREMENT PRIMARY KEY</text:p>
      <text:p text:style-name="P20">nombre_material = VARCHAR(30)</text:p>
      <text:p text:style-name="P20">fecha = DATE</text:p>
      <text:p text:style-name="P20">mensaje = VARCHAR(60)</text:p>
      <text:p text:style-name="P20">resuelta = BOOLEAN</text:p>
      <text:p text:style-name="P20"><text:soft-page-break/>Esta tabla funciona como un historial de todas las alertas de stock que el trigger “trg_alerta_stock” genere. El campo “resuelta” sirve para que el administrador marque las alertas como resueltas.</text:p>
      <text:p text:style-name="P20"/>
      <text:p text:style-name="P20">El id_alerta funciona como identificador de la fila que guarde la alerta.</text:p>
      <text:p text:style-name="P20"/>
      <text:p text:style-name="P20">El nombre_material guarda el nombre del material que haya generado la alerta (<text:span text:style-name="T9">recordar que el nombre no es un valor individual, si no común a varios materiales, como por ejemplo “tornillos”).</text:span></text:p>
      <text:p text:style-name="P20"/>
      <text:p text:style-name="P21">La fecha guarda la fecha en la que se haya generado la alerta.</text:p>
      <text:p text:style-name="P21"/>
      <text:p text:style-name="P21">El mensaje contiene un texto donde se indica cual es la diferencia entre la cantidad actual de materiales, y el stock mínimo programado.</text:p>
      <text:p text:style-name="P22"/>
      <text:p text:style-name="P23"/>
      <text:p text:style-name="P24"><text:span text:style-name="T9">3</text:span> – <text:span text:style-name="T10">Variables</text:span></text:p>
      <text:p text:style-name="P23"/>
      <text:p text:style-name="P25">La base de datos cuenta con dos variables de usuario:<text:line-break/>@id_usuario y @modo_actualizacion<text:line-break/><text:line-break/>La variable @id_usuario recibirá desde la aplicación el id del usuario que este trabajando con la base de datos. Esta información se utilizará para completar el campo id_usuario cuando se registre un movimiento en la tabla movimiento.<text:line-break/>Por defecto es NULL.</text:p>
      <text:p text:style-name="P25"/>
      <text:p text:style-name="P25">La variable @modo_actualizacion indica si los cambios que se están realizando en la base de datos deben o no ser registrados en la tabla movimiento.<text:line-break/>De esta manera, si se quiere hacer mantenimiento y, por ejemplo, borrar materiales que ya no existen, se pone @modo_actualizacion en TRUE, y así no se registrara como una actualización realizada por un usuario.<text:line-break/>Su valor por defecto es FALSE.</text:p>
      <text:p text:style-name="P23"/>
      <text:p text:style-name="P23"/>
      <text:p text:style-name="P1"><text:span text:style-name="T9">4</text:span> – <text:span text:style-name="T3">Funciones y procedimientos</text:span></text:p>
      <text:p text:style-name="P3"/>
      <text:p text:style-name="P26">La base de datos cuenta con los siguientes procedimientos:</text:p>
      <text:p text:style-name="P26">definirIdUsuario() y actualizarCantidad()</text:p>
      <text:p text:style-name="P26"/>
      <text:p text:style-name="P26">definirIdUsuario es un procedimiento que permite definir la variable @id_usuario desde la aplicación. Recibe un número entero como parámetro, y define la variable con el valor de ese parámetro.</text:p>
      <text:p text:style-name="P26"/>
      <text:p text:style-name="P26">actualizarCantidad es un procedimiento que permite, de forma automática, actualizar la cantidad de los distintos materiales.<text:line-break/>Su funcionamiento interno es el siguiente:<text:line-break/>Dentro de un bucle que recorrerá todas las filas de la tabla, selecciona el nombre del material, cuenta cuantas filas <text:span text:style-name="T11">hay en la tabla con el mismo nombre, y actualiza el valor “cantidad” de estas filas con el valor obtenido.<text:line-break/>Este procedimiento se tiene que llamar desde la aplicación cada vez que hay una interacción con la base de datos. De esta manera no se perderá información, y las alertas de stock se generaran correctamente.</text:span></text:p>
      <text:p text:style-name="P3"><text:soft-page-break/></text:p>
      <text:p text:style-name="P1"/>
      <text:p text:style-name="P1"><text:span text:style-name="T9">5</text:span> – <text:span text:style-name="T3">Triggers</text:span></text:p>
      <text:p text:style-name="P27"/>
      <text:p text:style-name="P28">La base de datos cuenta con los siguientes triggers:</text:p>
      <text:p text:style-name="P28"/>
      <text:p text:style-name="P29">Trg_movimiento<text:span text:style-name="T12">:</text:span></text:p>
      <text:p text:style-name="P28"/>
      <text:p text:style-name="P30">Este trigger se activa después de una actualización en la tabla material.<text:line-break/>Cuenta con una variable interna llamada “observaciones”.</text:p>
      <text:p text:style-name="P30"/>
      <text:p text:style-name="P31">Lo primero que hace es comprobar @modo_actualizacion. Si este es verdadero, entonces no hace nada. Si es falso comprueba los cambios que se han hecho en el material.<text:line-break/>Por cada campo en el que el valor NEW sea diferente al OLD, se añade a la variable “observaciones” el nombre del campo.</text:p>
      <text:p text:style-name="P31"><draw:frame draw:style-name="fr1" draw:name="Imagen3" text:anchor-type="char" svg:x="0.113cm" svg:y="0.37cm" svg:width="13.972cm" svg:height="2.117cm" draw:z-index="2"><draw:image xlink:href="Pictures/100000010000021000000050F55B6147.png" xlink:type="simple" xlink:show="embed" xlink:actuate="onLoad" draw:mime-type="image/png"/></draw:frame></text:p>
      <text:p text:style-name="P29"/>
      <text:p text:style-name="P29"/>
      <text:p text:style-name="P29"/>
      <text:p text:style-name="P29"/>
      <text:p text:style-name="P29"/>
      <text:p text:style-name="P32">Por último, se inserta una nueva fila en la tabla movimiento con los siguientes valores:</text:p>
      <text:p text:style-name="P32">- NEW.id_material<text:line-break/>- @id_usuario</text:p>
      <text:p text:style-name="P32">- curdate()<text:line-break/>- observaciones</text:p>
      <text:p text:style-name="P29"/>
      <text:p text:style-name="P29">Trg_alerta_stock<text:span text:style-name="T12">:</text:span></text:p>
      <text:p text:style-name="P28"/>
      <text:p text:style-name="P33">Este trigger se activa después de detectar una fila borrada en la tabla material. Si la cantidad actual de un material es inferior al stock mínimo programado, entonces se añade una nueva fila en la tabla alerta_stock.<text:line-break/><text:line-break/>Su funcionamiento interno es el siguiente:<text:line-break/>Recorre todas las filas de la tabla material. Lo primero, crea una variable “cantidadActual” en la que se almacena el número de materiales con un nombre igual al de la fila actual.<text:line-break/>Después hace un IF en el que se comprueba si “cantidadActual” es inferior a stock_minimo.<text:line-break/>Si el resultado es falso, no hace nada. Pero si es verdadero, define una variable “mensajes” en la que se guarda un texto que indica la diferencia entre cantidadActual y stock_minimo.</text:p>
      <text:p text:style-name="P33"><text:line-break/>Después se inserta una nueva fila en la tabla alerta_stock con los siguientes valores:<text:line-break/>- nombreMaterial</text:p>
      <text:p text:style-name="P33">- curdate()</text:p>
      <text:p text:style-name="P33">- mensajes</text:p>
      <text:p text:style-name="P33">- false</text:p>
      <text:p text:style-name="P33"/>
      <text:p text:style-name="P33">Ese último false se guarda en el campo “resuelta”.</text:p>
      <text:p text:style-name="P34"/>
      <text:p text:style-name="P34"><draw:frame draw:style-name="fr2" draw:name="Imagen4" text:anchor-type="char" svg:width="16.381cm" svg:height="1.808cm" draw:z-index="3"><draw:image xlink:href="Pictures/100000010000025F00000043E262EE0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1T17:32:16.430708300</meta:creation-date>
    <dc:date>2026-05-14T18:10:22.662682200</dc:date>
    <meta:editing-duration>PT3H11M41S</meta:editing-duration>
    <meta:editing-cycles>11</meta:editing-cycles>
    <meta:generator>LibreOffice/25.2.7.2$Windows_X86_64 LibreOffice_project/5cbfd1ab6520636bb5f7b99185aa69bd7456825d</meta:generator>
    <meta:document-statistic meta:table-count="0" meta:image-count="4" meta:object-count="0" meta:page-count="7" meta:paragraph-count="118" meta:word-count="1560" meta:character-count="9576" meta:non-whitespace-character-count="8105"/>
  </office:meta>
</office:document-meta>
</file>