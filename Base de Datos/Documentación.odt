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200000389684B7DF9.png" manifest:media-type="image/png"/>
  <manifest:file-entry manifest:full-path="Pictures/100000010000055100000798136203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rsid="001cbfd3" officeooo:paragraph-rsid="001cbfd3" style:font-weight-asian="bold" style:font-weight-complex="bold"/>
    </style:style>
    <style:style style:name="P2" style:family="paragraph" style:parent-style-name="Standard">
      <style:text-properties style:font-name="Arial" officeooo:rsid="001cbfd3" officeooo:paragraph-rsid="001cbfd3"/>
    </style:style>
    <style:style style:name="P3" style:family="paragraph" style:parent-style-name="Standard">
      <style:text-properties style:font-name="Arial" style:text-underline-style="solid" style:text-underline-width="auto" style:text-underline-color="font-color" fo:font-weight="bold" officeooo:rsid="001cbfd3" officeooo:paragraph-rsid="001cbfd3" style:font-weight-asian="bold" style:font-weight-complex="bold"/>
    </style:style>
    <style:style style:name="P4" style:family="paragraph" style:parent-style-name="Standard">
      <style:text-properties style:font-name="Arial" style:text-underline-style="none" fo:font-weight="normal" officeooo:rsid="001cbfd3" officeooo:paragraph-rsid="001cbfd3" style:font-weight-asian="normal" style:font-weight-complex="normal"/>
    </style:style>
    <style:style style:name="P5" style:family="paragraph" style:parent-style-name="Standard">
      <style:text-properties style:font-name="Arial" style:text-underline-style="none" fo:font-weight="normal" officeooo:rsid="001d8d0e" officeooo:paragraph-rsid="001d8d0e" style:font-weight-asian="normal" style:font-weight-complex="normal"/>
    </style:style>
    <style:style style:name="P6" style:family="paragraph" style:parent-style-name="Standard">
      <style:text-properties style:font-name="Arial" fo:font-style="italic" style:text-underline-style="solid" style:text-underline-width="auto" style:text-underline-color="font-color" fo:font-weight="normal" officeooo:rsid="001d8d0e" officeooo:paragraph-rsid="001d8d0e" style:font-style-asian="italic" style:font-weight-asian="normal" style:font-style-complex="italic" style:font-weight-complex="normal"/>
    </style:style>
    <style:style style:name="P7" style:family="paragraph" style:parent-style-name="Standard">
      <style:text-properties style:font-name="Arial" fo:font-style="normal" style:text-underline-style="none" fo:font-weight="normal" officeooo:rsid="001d8d0e" officeooo:paragraph-rsid="001d8d0e" style:font-style-asian="normal" style:font-weight-asian="normal" style:font-style-complex="normal" style:font-weight-complex="normal"/>
    </style:style>
    <style:style style:name="P8" style:family="paragraph" style:parent-style-name="Standard">
      <style:text-properties style:font-name="Arial" fo:font-style="italic" style:text-underline-style="solid" style:text-underline-width="auto" style:text-underline-color="font-color" fo:font-weight="normal" officeooo:rsid="00204b2e" officeooo:paragraph-rsid="001d8d0e" style:font-style-asian="italic" style:font-weight-asian="normal" style:font-style-complex="italic" style:font-weight-complex="normal"/>
    </style:style>
    <style:style style:name="P9" style:family="paragraph" style:parent-style-name="Standard">
      <style:text-properties style:font-name="Arial" fo:font-style="normal" style:text-underline-style="none" fo:font-weight="normal" officeooo:rsid="00204b2e" officeooo:paragraph-rsid="00205703" style:font-style-asian="normal" style:font-weight-asian="normal" style:font-style-complex="normal" style:font-weight-complex="normal"/>
    </style:style>
    <style:style style:name="P10" style:family="paragraph" style:parent-style-name="Standard">
      <style:text-properties style:font-name="Arial" fo:font-style="italic" style:text-underline-style="none" fo:font-weight="normal" officeooo:rsid="00204b2e" officeooo:paragraph-rsid="00204b2e" style:font-style-asian="italic" style:font-weight-asian="normal" style:font-style-complex="italic" style:font-weight-complex="normal"/>
    </style:style>
    <style:style style:name="P11" style:family="paragraph" style:parent-style-name="Standard">
      <style:text-properties style:font-name="Arial" fo:font-style="normal" style:text-underline-style="none" fo:font-weight="normal" officeooo:rsid="00204b2e" officeooo:paragraph-rsid="00204b2e" style:font-style-asian="normal" style:font-weight-asian="normal" style:font-style-complex="normal" style:font-weight-complex="normal"/>
    </style:style>
    <style:style style:name="P12" style:family="paragraph" style:parent-style-name="Standard">
      <style:text-properties style:font-name="Arial" fo:font-style="normal" style:text-underline-style="none" fo:font-weight="normal" officeooo:rsid="00205703" officeooo:paragraph-rsid="00205703" style:font-style-asian="normal" style:font-weight-asian="normal" style:font-style-complex="normal" style:font-weight-complex="normal"/>
    </style:style>
    <style:style style:name="P13" style:family="paragraph" style:parent-style-name="Standard">
      <style:text-properties style:font-name="Arial" fo:font-style="italic" style:text-underline-style="none" fo:font-weight="normal" officeooo:rsid="00205703" officeooo:paragraph-rsid="00205703" style:font-style-asian="italic" style:font-weight-asian="normal" style:font-style-complex="italic" style:font-weight-complex="normal"/>
    </style:style>
    <style:style style:name="P14" style:family="paragraph" style:parent-style-name="Standard">
      <style:text-properties style:font-name="Arial" fo:font-style="normal" style:text-underline-style="none" fo:font-weight="normal" officeooo:rsid="00205da6" officeooo:paragraph-rsid="00205da6" style:font-style-asian="normal" style:font-weight-asian="normal" style:font-style-complex="normal" style:font-weight-complex="normal"/>
    </style:style>
    <style:style style:name="P15" style:family="paragraph" style:parent-style-name="Standard">
      <style:text-properties style:font-name="Arial" fo:font-style="normal" style:text-underline-style="none" fo:font-weight="normal" officeooo:rsid="00205da6" officeooo:paragraph-rsid="0021a096" style:font-style-asian="normal" style:font-weight-asian="normal" style:font-style-complex="normal" style:font-weight-complex="normal"/>
    </style:style>
    <style:style style:name="P16" style:family="paragraph" style:parent-style-name="Standard">
      <style:text-properties style:font-name="Arial" fo:font-style="normal" style:text-underline-style="none" fo:font-weight="normal" officeooo:rsid="0021a096" officeooo:paragraph-rsid="0021a096" style:font-style-asian="normal" style:font-weight-asian="normal" style:font-style-complex="normal" style:font-weight-complex="normal"/>
    </style:style>
    <style:style style:name="P17" style:family="paragraph" style:parent-style-name="Standard">
      <style:text-properties style:font-name="Arial" fo:font-style="normal" style:text-underline-style="none" fo:font-weight="normal" officeooo:rsid="0021e7e7" officeooo:paragraph-rsid="0021e7e7" style:font-style-asian="normal" style:font-weight-asian="normal" style:font-style-complex="normal" style:font-weight-complex="normal"/>
    </style:style>
    <style:style style:name="P18" style:family="paragraph" style:parent-style-name="Standard">
      <style:text-properties style:font-name="Arial" fo:font-style="italic" style:text-underline-style="solid" style:text-underline-width="auto" style:text-underline-color="font-color" fo:font-weight="normal" officeooo:rsid="001d8d0e" officeooo:paragraph-rsid="00231018" style:font-style-asian="italic" style:font-weight-asian="normal" style:font-style-complex="italic" style:font-weight-complex="normal"/>
    </style:style>
    <style:style style:name="P19" style:family="paragraph" style:parent-style-name="Standard">
      <style:text-properties style:font-name="Arial" fo:font-style="normal" style:text-underline-style="none" fo:font-weight="normal" officeooo:rsid="00238789" officeooo:paragraph-rsid="00238789" style:font-style-asian="normal" style:font-weight-asian="normal" style:font-style-complex="normal" style:font-weight-complex="normal"/>
    </style:style>
    <style:style style:name="P20" style:family="paragraph" style:parent-style-name="Standard">
      <style:text-properties style:font-name="Arial" fo:font-weight="bold" officeooo:rsid="001cbfd3" officeooo:paragraph-rsid="001d8d0e" style:font-weight-asian="bold" style:font-weight-complex="bold"/>
    </style:style>
    <style:style style:name="P21" style:family="paragraph" style:parent-style-name="Standard">
      <style:text-properties style:font-name="Arial" style:text-underline-style="none" fo:font-weight="normal" officeooo:rsid="00238789" officeooo:paragraph-rsid="00238789" style:font-weight-asian="normal" style:font-weight-complex="normal"/>
    </style:style>
    <style:style style:name="P22" style:family="paragraph" style:parent-style-name="Standard">
      <style:text-properties style:font-name="Arial" style:text-underline-style="none" fo:font-weight="normal" officeooo:rsid="002456de" officeooo:paragraph-rsid="001cbfd3" style:font-weight-asian="normal" style:font-weight-complex="normal"/>
    </style:style>
    <style:style style:name="P23" style:family="paragraph" style:parent-style-name="Standard">
      <style:text-properties style:font-name="Arial" style:text-underline-style="none" fo:font-weight="normal" officeooo:rsid="00253791" officeooo:paragraph-rsid="00253791" style:font-weight-asian="normal" style:font-weight-complex="normal"/>
    </style:style>
    <style:style style:name="P24" style:family="paragraph" style:parent-style-name="Standard">
      <style:text-properties style:font-name="Arial" style:text-underline-style="solid" style:text-underline-width="auto" style:text-underline-color="font-color" fo:font-weight="normal" officeooo:rsid="00253791" officeooo:paragraph-rsid="00253791"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205703"/>
    </style:style>
    <style:style style:name="T5" style:family="text">
      <style:text-properties officeooo:rsid="0021a096"/>
    </style:style>
    <style:style style:name="T6" style:family="text">
      <style:text-properties style:text-underline-style="none"/>
    </style:style>
    <style:style style:name="T7" style:family="text">
      <style:text-properties officeooo:rsid="002558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Historias del Hardware<text:tab/>//<text:tab/>1ºDAM 2025/26</text:p>
      <text:p text:style-name="P1"/>
      <text:p text:style-name="P2"><text:span text:style-name="T1">BASE DE DATOS</text:span><text:line-break/><text:line-break/></text:p>
      <text:p text:style-name="P2"><text:span text:style-name="T2">Manuel González Encinas</text:span><text:line-break/><text:line-break/></text:p>
      <text:p text:style-name="P1">1 – <text:span text:style-name="T3">Función de la base de datos</text:span></text:p>
      <text:p text:style-name="P3"/>
      <text:p text:style-name="P4">La base de datos permite almacenar información sobre el almacén del instituto. Esto incluye información sobre los materiales, los armarios, y los usuarios que tienen acceso a la aplicación desde la que se gestionan los préstamos y las devoluciones.</text:p>
      <text:p text:style-name="P4"/>
      <text:p text:style-name="P4">Estos préstamos, devoluciones, y movimientos de material en general, también quedan registrados en la base de datos, de tal manera que el administrador cuente con un historial de movimientos en el almacén.</text:p>
      <text:p text:style-name="P4"/>
      <text:p text:style-name="P5">La base de datos también cuenta con un sistema que supervisa el stock disponible de cada tipo de material. Cuando la cantidad de materiales disponibles está por debajo del mínimo, se genera una alerta de stock, la cual también queda registrada en un historial.</text:p>
      <text:p text:style-name="P1"/>
      <text:p text:style-name="P1">2 – <text:span text:style-name="T3">Tablas</text:span></text:p>
      <text:p text:style-name="P3"><draw:frame draw:style-name="fr1" draw:name="Imagen1" text:anchor-type="char" svg:x="1.249cm" svg:y="0.381cm" svg:width="13.771cm" svg:height="14.058cm" draw:z-index="0"><draw:image xlink:href="Pictures/100000010000037200000389684B7DF9.png" xlink:type="simple" xlink:show="embed" xlink:actuate="onLoad" draw:mime-type="image/png"/></draw:frame></text:p>
      <text:p text:style-name="P6"><text:soft-page-break/>-Ubicación</text:p>
      <text:p text:style-name="P7"/>
      <text:p text:style-name="P7">La tabla ubicación incluye los siguientes campos:<text:line-break/></text:p>
      <text:p text:style-name="P7">id_ubicacion = INT PRIMARY KEY</text:p>
      <text:p text:style-name="P7">armario = INT</text:p>
      <text:p text:style-name="P7">balda = INT</text:p>
      <text:p text:style-name="P7">cajon = INT</text:p>
      <text:p text:style-name="P7">descripcion = VARCHAR(50)</text:p>
      <text:p text:style-name="P7"/>
      <text:p text:style-name="P7">El identificador de la ubicación es id_ubicacion, el cual es un número entero único. No son auto incrementados, ya que se reparten siguiendo el siguiente esquema:<text:line-break/><draw:frame draw:style-name="fr1" draw:name="Imagen2" text:anchor-type="char" svg:x="1.476cm" svg:y="1.453cm" svg:width="13.43cm" svg:height="19.248cm" draw:z-index="1"><draw:image xlink:href="Pictures/1000000100000551000007981362035A.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9"><text:soft-page-break/>Armario, balda y cajon contienen los códigos (sin prefijo) que indican la estructura en la que está contenida la ubicación.<text:line-break/><text:line-break/>De esta manera, el armario 1 es así:</text:p>
      <text:p text:style-name="P9"><text:line-break/><text:span text:style-name="T2">-Identificador = 11<text:line-break/>-Armario = 1</text:span></text:p>
      <text:p text:style-name="P10">-Balda = NULL</text:p>
      <text:p text:style-name="P10">-Cajon = NULL<text:line-break/>-Descripción = A1</text:p>
      <text:p text:style-name="P11"/>
      <text:p text:style-name="P11">El identificador debería ser A1, pero, como es un INT, se convierte en 11 siguiendo el procedimiento indicado en el esquema.</text:p>
      <text:p text:style-name="P11"/>
      <text:p text:style-name="P11"/>
      <text:p text:style-name="P9">Existen baldas independientes que no están contenidas en ningún armario. Estas se guardan así:</text:p>
      <text:p text:style-name="P9"><text:line-break/><text:span text:style-name="T2">-Identificador = 2001<text:line-break/>-Armario = NULL</text:span></text:p>
      <text:p text:style-name="P10">-Balda = 1</text:p>
      <text:p text:style-name="P10">-Cajon = NULL</text:p>
      <text:p text:style-name="P10">-Descripción = Balda B001</text:p>
      <text:p text:style-name="P11"/>
      <text:p text:style-name="P11"/>
      <text:p text:style-name="P11">Una balda contenida en un armario se guarda así:</text:p>
      <text:p text:style-name="P11"/>
      <text:p text:style-name="P10">-Identificador = 2101 </text:p>
      <text:p text:style-name="P10">-Armario = 11</text:p>
      <text:p text:style-name="P10">-Balda = 101</text:p>
      <text:p text:style-name="P10">-Cajon = NULL</text:p>
      <text:p text:style-name="P10">-Descripción = <text:span text:style-name="T4">Balda B101</text:span></text:p>
      <text:p text:style-name="P11"/>
      <text:p text:style-name="P12">En el código de la balda, el tercer dígito empezando desde la derecha hace referencia al armario, de tal manera que, la balda 101 está en el armario 1, la 302 en el armario 3, y la 001 no está en ningún armario.</text:p>
      <text:p text:style-name="P12"/>
      <text:p text:style-name="P12"/>
      <text:p text:style-name="P12">Un cajón se guarda así:</text:p>
      <text:p text:style-name="P12"/>
      <text:p text:style-name="P13">-Identificador = 300301</text:p>
      <text:p text:style-name="P13">-Armario = NULL</text:p>
      <text:p text:style-name="P13">-Balda = 3</text:p>
      <text:p text:style-name="P13">-Cajon = 00301</text:p>
      <text:p text:style-name="P13">-Descripción = Cajon C00301</text:p>
      <text:p text:style-name="P13"/>
      <text:p text:style-name="P12">En el código <text:span text:style-name="T2">cajon</text:span>, los tres primeros dígitos empezando desde la izquierda son el código de la balda.</text:p>
      <text:p text:style-name="P11"/>
      <text:p text:style-name="P6"/>
      <text:p text:style-name="P6"/>
      <text:p text:style-name="P6"><text:soft-page-break/><text:line-break/>-Material</text:p>
      <text:p text:style-name="P6"/>
      <text:p text:style-name="P14">La tabla material se compone de los siguientes campos: <text:line-break/></text:p>
      <text:p text:style-name="P14">id_material = INT PRIMARY KEY AUTO_INCREMENT</text:p>
      <text:p text:style-name="P14">nombre = VARCHAR(30)</text:p>
      <text:p text:style-name="P14">descripcion = VARCHAR (60)</text:p>
      <text:p text:style-name="P14">cantidad = INT</text:p>
      <text:p text:style-name="P14">stock_minimo = INT</text:p>
      <text:p text:style-name="P14">categoria = ENUM<text:line-break/>estado = ENUM</text:p>
      <text:p text:style-name="P14">id_ubicacion = INT FOREIGN KEY</text:p>
      <text:p text:style-name="P14"/>
      <text:p text:style-name="P14">El id_material es un número entero auto incrementado, que funciona como identificador del material.</text:p>
      <text:p text:style-name="P14"/>
      <text:p text:style-name="P14">El nombre indica la naturaleza del material, mientras que la descripción añade detalles genéricos y/o individuales.</text:p>
      <text:p text:style-name="P15">Es importante tener en cuenta que nombre no es un valor individual, de tal manera que los materiales <text:span text:style-name="T5">están organizados según:</text:span></text:p>
      <text:p text:style-name="P15"/>
      <text:p text:style-name="P16"><text:span text:style-name="T2">Categoría → Nombre → Estado → Descripción</text:span> </text:p>
      <text:p text:style-name="P16"/>
      <text:p text:style-name="P16">Descripción y estado es el único campo que puede dar individualidad al material.</text:p>
      <text:p text:style-name="P16"/>
      <text:p text:style-name="P16">La cantidad es un atributo común a todos los materiales con el mismo nombre. Indica el número de materiales que hay registrados con el mismo nombre.</text:p>
      <text:p text:style-name="P16">Stock mínimo también es un atributo común. Almacena el número mínimo de materiales que puede haber registrados con el mismo nombre. Si la cantidad fuese igual o inferior al stock mínimo, se crearía una alerta de stock.</text:p>
      <text:p text:style-name="P16"/>
      <text:p text:style-name="P16">Categoría es un valor enumerado que indica el tipo general de material. Los valores posibles son “Hardware”, ”Herramienta”, ”Fungible” y “Cuaderno”.</text:p>
      <text:p text:style-name="P16"/>
      <text:p text:style-name="P16">Estado también es un valor enumerado que indica el estado de disponibilidad del material. De esta manera, los valores posibles son “Disponible”, “Prestado”, “En reparación” y “Retirado”.</text:p>
      <text:p text:style-name="P16"/>
      <text:p text:style-name="P17">Y por último, id_ubicacion es una clave foránea que hace referencia a la ubicación donde está almacenado el material.</text:p>
      <text:p text:style-name="P14"/>
      <text:p text:style-name="P6"/>
      <text:p text:style-name="P6">-Usuario</text:p>
      <text:p text:style-name="P6"/>
      <text:p text:style-name="P17">La tabla usuarios tiene los siguientes campos:<text:line-break/></text:p>
      <text:p text:style-name="P17">id_usuario = INT PRIMARY KEY AUTO_INCREMENT</text:p>
      <text:p text:style-name="P17">nombre = VARCHAR(20)</text:p>
      <text:p text:style-name="P17">apellidos = VARCHAR(30)</text:p>
      <text:p text:style-name="P17">email = VARCHAR(30) UNIQUE</text:p>
      <text:p text:style-name="P17">contraseña = VARCHAR(20)</text:p>
      <text:p text:style-name="P17"><text:soft-page-break/>rol = ENUM</text:p>
      <text:p text:style-name="P17">activo = BOOLEAN</text:p>
      <text:p text:style-name="P17">fecha_creacion = DATE</text:p>
      <text:p text:style-name="P17"/>
      <text:p text:style-name="P17">En esta tabla se almacenarán los datos de los usuarios que creen una cuenta en la aplicación de escritorio.</text:p>
      <text:p text:style-name="P17"/>
      <text:p text:style-name="P17">Id_usuario es un número entero auto incrementado que funciona como identificador del usuario.</text:p>
      <text:p text:style-name="P17">Email guarda la dirección de correo electrónico del usuario. Al ser UNIQUE, no se puede guardar una misma dirección de email dos veces.</text:p>
      <text:p text:style-name="P17"/>
      <text:p text:style-name="P17">El rol es un valor enumerado con las siguientes opciones: “Profesor” y “Administrador”.</text:p>
      <text:p text:style-name="P17">Según el rol que un usuario tenga registrado, en la aplicación tendrá, o no, una serie de funciones restringidas.</text:p>
      <text:p text:style-name="P17"/>
      <text:p text:style-name="P17">Activo es un booleano que indica si el usuario se ha dado de alta, o de baja.</text:p>
      <text:p text:style-name="P17"/>
      <text:p text:style-name="P17">Y fecha_creacion guarda la fecha en la que se creó el usuario.</text:p>
      <text:p text:style-name="P6"/>
      <text:p text:style-name="P6">-Movimiento</text:p>
      <text:p text:style-name="P6"/>
      <text:p text:style-name="P18"/>
      <text:p text:style-name="P6"/>
      <text:p text:style-name="P6">-Alerta_stock</text:p>
      <text:p text:style-name="P6"/>
      <text:p text:style-name="P19"/>
      <text:p text:style-name="P20"/>
      <text:p text:style-name="P20"/>
      <text:p text:style-name="P1">3 – <text:span text:style-name="T3">Funciones y procedimientos</text:span></text:p>
      <text:p text:style-name="P3"/>
      <text:p text:style-name="P21">La base de datos contiene un procedimiento llamado actualizarCantidad.</text:p>
      <text:p text:style-name="P21">Este procedimiento permite actualizar automáticamente el campo cantidad de todos los materiales de la base de datos.</text:p>
      <text:p text:style-name="P21"><text:line-break/>Este es su funcionamiento interno:</text:p>
      <text:p text:style-name="P21"/>
      <text:p text:style-name="P21">Dentro de un bucle con un contador, primero se selecciona el nombre del material cuyo identificador sea igual al contador.<text:line-break/>Después se hace un SELECT count(*) de todos los materiales cuyo nombre sea igual al resultado de la primera consulta. Esto devuelve el número de materiales que hay registrados con el mismo nombre.<text:line-break/>Por último, se actualiza el campo cantidad con el resultado de la segunda consulta en todos los materiales cuyos nombres sean iguales al resultado de la primera consulta.<text:line-break/></text:p>
      <text:p text:style-name="P21">Después se incrementa el contador, y se repite el proceso hasta que el contador sea igual a la cantidad total de materiales registrados.</text:p>
      <text:p text:style-name="P3"/>
      <text:p text:style-name="P1"/>
      <text:p text:style-name="P1">4 – <text:span text:style-name="T3">Triggers</text:span></text:p>
      <text:p text:style-name="P22"/>
      <text:p text:style-name="P23">La base de datos cuenta con los siguientes triggers:</text:p>
      <text:p text:style-name="P23"><text:soft-page-break/></text:p>
      <text:p text:style-name="P24">Trg_movimiento<text:span text:style-name="T6">:</text:span></text:p>
      <text:p text:style-name="P23"/>
      <text:p text:style-name="P23">Este trigger se activa cuando hay una actualización en un material.<text:line-break/>Al detectar la actualización de un material, se inserta una nueva fila en la tabla Movimientos.<text:line-break/>En esta fila se añaden datos generales (curdate() para fecha) y los del material actualizado.</text:p>
      <text:p text:style-name="P24"/>
      <text:p text:style-name="P24">Trg_alerta_stock<text:span text:style-name="T6">:</text:span></text:p>
      <text:p text:style-name="P23"/>
      <text:p text:style-name="P23">Este trigger se activa cuando hay una actualización en un material.</text:p>
      <text:p text:style-name="P23">Al detectar la actualización de un material, <text:span text:style-name="T7">lo primero se llama al procedimiento actualizarCantid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1T17:32:16.430708300</meta:creation-date>
    <dc:date>2026-05-12T17:49:18.653763000</dc:date>
    <meta:editing-duration>PT36M3S</meta:editing-duration>
    <meta:editing-cycles>4</meta:editing-cycles>
    <meta:generator>LibreOffice/25.2.7.2$Windows_X86_64 LibreOffice_project/5cbfd1ab6520636bb5f7b99185aa69bd7456825d</meta:generator>
    <meta:document-statistic meta:table-count="0" meta:image-count="2" meta:object-count="0" meta:page-count="6" meta:paragraph-count="91" meta:word-count="1003" meta:character-count="6113" meta:non-whitespace-character-count="5180"/>
  </office:meta>
</office:document-meta>
</file>